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2827in"/>
    </style:style>
    <style:style style:name="co2" style:family="table-column">
      <style:table-column-properties fo:break-before="auto" style:column-width="6.8118in"/>
    </style:style>
    <style:style style:name="co3" style:family="table-column">
      <style:table-column-properties fo:break-before="auto" style:column-width="0.889in"/>
    </style:style>
    <style:style style:name="co4" style:family="table-column">
      <style:table-column-properties fo:break-before="auto" style:column-width="3.5591in"/>
    </style:style>
    <style:style style:name="ro1" style:family="table-row">
      <style:table-row-properties style:row-height="0.178in" fo:break-before="auto" style:use-optimal-row-height="true"/>
    </style:style>
    <style:style style:name="ro2" style:family="table-row">
      <style:table-row-properties style:row-height="0.7972in" fo:break-before="auto" style:use-optimal-row-height="true"/>
    </style:style>
    <style:style style:name="ro3" style:family="table-row">
      <style:table-row-properties style:row-height="0.6374in" fo:break-before="auto" style:use-optimal-row-height="true"/>
    </style:style>
    <style:style style:name="ro4" style:family="table-row">
      <style:table-row-properties style:row-height="0.478in" fo:break-before="auto" style:use-optimal-row-height="true"/>
    </style:style>
    <style:style style:name="ro5" style:family="table-row">
      <style:table-row-properties style:row-height="2.0417in" fo:break-before="auto" style:use-optimal-row-height="true"/>
    </style:style>
    <style:style style:name="ro6" style:family="table-row">
      <style:table-row-properties style:row-height="1.9134in" fo:break-before="auto" style:use-optimal-row-height="true"/>
    </style:style>
    <style:style style:name="ro7" style:family="table-row">
      <style:table-row-properties style:row-height="5.022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asian="DejaVu Sans" style:font-name-complex="DejaVu Sans"/>
    </style:style>
    <style:style style:name="ce5" style:family="table-cell" style:parent-style-name="Default">
      <style:table-cell-properties fo:wrap-option="wra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number-columns-repeated="17" table:default-cell-style-name="ce3"/>
        <table:table-column table:style-name="co4" table:default-cell-style-name="ce3"/>
        <table:table-column table:style-name="co3" table:number-columns-repeated="16364" table:default-cell-style-name="ce3"/>
        <table:table-row table:style-name="ro1">
          <table:table-cell office:value-type="string" calcext:value-type="string">
            <text:p>queries</text:p>
          </table:table-cell>
          <table:table-cell office:value-type="string" calcext:value-type="string">
            <text:p>truth</text:p>
          </table:table-cell>
          <table:table-cell table:number-columns-repeated="17"/>
          <table:table-cell office:value-type="string" calcext:value-type="string">
            <text:p>truth</text:p>
          </table:table-cell>
          <table:table-cell table:number-columns-repeated="16364"/>
        </table:table-row>
        <table:table-row table:style-name="ro2">
          <table:table-cell office:value-type="string" calcext:value-type="string">
            <text:p>Host1: 34.2.1.4  </text:p>
            <text:p>  - MQTT broker  </text:p>
            <text:p>  - SSH server  </text:p>
            <text:p/>
            <text:p>Check if the communication between the client and the MQTT broker is encrypted, ensure the machine is reachable via SSH, and verify the integrity of the /bin/folder.</text:p>
          </table:table-cell>
          <table:table-cell office:value-type="string" calcext:value-type="string">
            <text:p>[{ "host": "34.2.1.4", "probe": "mqtt-tls-server" }, <text:s/>\n{ "host": "34.2.1.4", "probe": "ssh-scan" }, <text:s/>\n{ "host": "34.2.1.4", "probe": "aide-oneshot-new" }]</text:p>
          </table:table-cell>
          <table:table-cell table:number-columns-repeated="17"/>
          <table:table-cell office:value-type="string" calcext:value-type="string">
            <text:p>[“mqtt-tls-server”,”aide-oneshot-new”, “fairness-ssh”]</text:p>
          </table:table-cell>
          <table:table-cell table:number-columns-repeated="16364"/>
        </table:table-row>
        <table:table-row table:style-name="ro3">
          <table:table-cell office:value-type="string" calcext:value-type="string">
            <text:p>Host1: 10.4.5.2  </text:p>
            <text:p>- Web server on port 8083  </text:p>
            <text:p/>
            <text:p>Check if the web server follows Mozilla guidelines.</text:p>
          </table:table-cell>
          <table:table-cell office:value-type="string" calcext:value-type="string">
            <text:p>[{ "host": "10.4.5.2", "probe": "observatory" }]</text:p>
          </table:table-cell>
          <table:table-cell table:number-columns-repeated="17"/>
          <table:table-cell office:value-type="string" calcext:value-type="string">
            <text:p>[“observatory”]</text:p>
          </table:table-cell>
          <table:table-cell table:number-columns-repeated="16364"/>
        </table:table-row>
        <table:table-row table:style-name="ro4">
          <table:table-cell table:style-name="ce4" office:value-type="string" calcext:value-type="string">
            <text:p>Host1: 172.22.1.15  </text:p>
            <text:p/>
            <text:p>Find all files with SUID permissions.</text:p>
          </table:table-cell>
          <table:table-cell office:value-type="string" calcext:value-type="string">
            <text:p>[{ "host": "172.22.1.15", "probe": "find" }]</text:p>
          </table:table-cell>
          <table:table-cell table:number-columns-repeated="17"/>
          <table:table-cell office:value-type="string" calcext:value-type="string">
            <text:p>[“find”]</text:p>
          </table:table-cell>
          <table:table-cell table:number-columns-repeated="16364"/>
        </table:table-row>
        <table:table-row table:style-name="ro2">
          <table:table-cell office:value-type="string" calcext:value-type="string">
            <text:p>Host1: 90.3.4.1  </text:p>
            <text:p>- Web server on port 1345  </text:p>
            <text:p>Host2: 90.3.4.2  </text:p>
            <text:p/>
            <text:p><text:span text:style-name="T1">Check that the disk usage is nominal. Ensure the confidentiality of the communication channel for the web server.  </text:span></text:p>
          </table:table-cell>
          <table:table-cell office:value-type="string" calcext:value-type="string">
            <text:p>[{ "host": "90.3.4.1", "probe": "sslyze" }, <text:s/>\n{ "host": "90.3.4.2", "probe": "disk-free" }]</text:p>
          </table:table-cell>
          <table:table-cell table:number-columns-repeated="17"/>
          <table:table-cell office:value-type="string" calcext:value-type="string">
            <text:p>[“disk-free”, “sslyze”]</text:p>
          </table:table-cell>
          <table:table-cell table:number-columns-repeated="16364"/>
        </table:table-row>
        <table:table-row table:style-name="ro4">
          <table:table-cell office:value-type="string" calcext:value-type="string">
            <text:p>Host1: 45.2.1.2  </text:p>
            <text:p/>
            <text:p>Verify that the host is reachable using ICMP and check that the ML model running on port 4555 meets accuracy = 1, recall = 0.9, and precision = 0.9.</text:p>
          </table:table-cell>
          <table:table-cell office:value-type="string" calcext:value-type="string">
            <text:p>[{ "host": "45.2.1.2", "probe": "ping" }, <text:s/>\n{ "host": "45.2.1.2", "probe": "ML metric checker" }]</text:p>
          </table:table-cell>
          <table:table-cell table:number-columns-repeated="17"/>
          <table:table-cell office:value-type="string" calcext:value-type="string">
            <text:p>[“ML metric checker”, “ping”]</text:p>
          </table:table-cell>
          <table:table-cell table:number-columns-repeated="16364"/>
        </table:table-row>
        <table:table-row table:style-name="ro5">
          <table:table-cell table:style-name="ce5" office:value-type="string" calcext:value-type="string">
            <text:p>Host1: 172.30.20.180  </text:p>
            <text:p>- Web server  </text:p>
            <text:p/>
            <text:p>Host2: 172.30.20.181  </text:p>
            <text:p>- Database server  </text:p>
            <text:p/>
            <text:p>Host3: 172.30.20.182  </text:p>
            <text:p>- Backup server  </text:p>
            <text:p/>
            <text:p>Host4: 172.30.20.183  </text:p>
            <text:p>- Monitoring server  </text:p>
            <text:p/>
            <text:p>Check for vulnerabilities on the web server, verify disk usage on the database server, check file integrity on the backup server, and ensure the monitoring server can reach all other hosts using ping.</text:p>
          </table:table-cell>
          <table:table-cell office:value-type="string" calcext:value-type="string">
            <text:p>[{ "host": "172.30.20.180", "probe": "lightweight-vuln-scan" }, <text:s/>\n{ "host": "172.30.20.181", "probe": "disk-free" }, <text:s/>\n{ "host": "172.30.20.182", "probe": "aide-oneshot-new" }, <text:s/>\n{ "host": "172.30.20.183", "probe": "ping" }, <text:s/>\n{ "host": "172.30.20.183", "probe": "ping"}, <text:s/>\n{ "host": "172.30.20.183", "probe": "ping" }]</text:p>
          </table:table-cell>
          <table:table-cell table:number-columns-repeated="17"/>
          <table:table-cell office:value-type="string" calcext:value-type="string">
            <text:p>[“disk-free”, “aide-oneshot-new”, “ping”, “lightweight-vuln-scan”, “web-vuln-scan”]</text:p>
          </table:table-cell>
          <table:table-cell table:number-columns-repeated="16364"/>
        </table:table-row>
        <table:table-row table:style-name="ro6">
          <table:table-cell table:style-name="ce4" office:value-type="string" calcext:value-type="string">
            <text:p>Host1: 172.1.5.6</text:p>
            <text:p>    - mqtt broker on port 1337</text:p>
            <text:p>    - ssh server on port 4564</text:p>
            <text:p>    - rpc service on port 111</text:p>
            <text:p>    - ftp on port 2010</text:p>
            <text:p>Host2: 172.1.5.7</text:p>
            <text:p>    - An nginx web server on port 6789</text:p>
            <text:p>Host3: 172.1.5.8</text:p>
            <text:p>    - mqtt broker on port 4567</text:p>
            <text:p>    - An apache web server on port 80</text:p>
            <text:p/>
            <text:p>Check the web server TLS configuration but only on the apache ones</text:p>
          </table:table-cell>
          <table:table-cell office:value-type="string" calcext:value-type="string">
            <text:p>[{ "host": "172.1.5.7", "probe": "sslyze" }]</text:p>
          </table:table-cell>
          <table:table-cell table:number-columns-repeated="16382"/>
        </table:table-row>
        <table:table-row table:style-name="ro1" table:number-rows-repeated="2">
          <table:table-cell table:style-name="ce5"/>
          <table:table-cell table:number-columns-repeated="16383"/>
        </table:table-row>
        <table:table-row table:style-name="ro1" table:number-rows-repeated="4">
          <table:table-cell table:style-name="ce4"/>
          <table:table-cell table:number-columns-repeated="16383"/>
        </table:table-row>
        <table:table-row table:style-name="ro1">
          <table:table-cell table:style-name="ce5"/>
          <table:table-cell table:number-columns-repeated="16383"/>
        </table:table-row>
        <table:table-row table:style-name="ro1">
          <table:table-cell table:style-name="ce4"/>
          <table:table-cell table:number-columns-repeated="16383"/>
        </table:table-row>
        <table:table-row table:style-name="ro7">
          <table:table-cell table:number-columns-repeated="16384"/>
        </table:table-row>
        <table:table-row table:style-name="ro1" table:number-rows-repeated="104855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2:02:34.103058707</meta:creation-date>
    <dc:date>2025-05-10T13:08:01.839449322</dc:date>
    <meta:editing-duration>PT14H52M42S</meta:editing-duration>
    <meta:editing-cycles>31</meta:editing-cycles>
    <meta:generator>LibreOffice/7.4.7.2$Linux_X86_64 LibreOffice_project/40$Build-2</meta:generator>
    <meta:document-statistic meta:table-count="1" meta:cell-count="23" meta:object-count="0"/>
  </office:meta>
</office:document-meta>
</file>