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6453in"/>
    </style:style>
    <style:style style:name="co2" style:family="table-column">
      <style:table-column-properties fo:break-before="auto" style:column-width="6.1327in"/>
    </style:style>
    <style:style style:name="co3"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8484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row table:style-name="ro1">
          <table:table-cell table:style-name="ce1" office:value-type="string" calcext:value-type="string">
            <text:p>Probe</text:p>
          </table:table-cell>
          <table:table-cell table:style-name="ce1" office:value-type="string" calcext:value-type="string">
            <text:p>Description</text:p>
          </table:table-cell>
        </table:table-row>
        <table:table-row table:style-name="ro2">
          <table:table-cell office:value-type="string" calcext:value-type="string">
            <text:p>Aide-oneshot-new</text:p>
          </table:table-cell>
          <table:table-cell office:value-type="string" calcext:value-type="string">
            <text:p>This probe ensures the integrity of a specified part of filesystem through the path given in input.</text:p>
            <text:p>It has two scanning modes:</text:p>
            <text:p/>
            <text:p>"system" : scans the most important system folders, not necessarily need an input path</text:p>
            <text:p>"custom" : scans only the input path</text:p>
          </table:table-cell>
        </table:table-row>
        <table:table-row table:style-name="ro1">
          <table:table-cell office:value-type="string" calcext:value-type="string">
            <text:p>Apache-cis</text:p>
          </table:table-cell>
          <table:table-cell office:value-type="string" calcext:value-type="string">
            <text:p>Implementation of the CIS benchmark for the Apache HTTP Server.</text:p>
          </table:table-cell>
        </table:table-row>
        <table:table-row table:style-name="ro1">
          <table:table-cell office:value-type="string" calcext:value-type="string">
            <text:p>Assurance-engine-basic-probe</text:p>
          </table:table-cell>
          <table:table-cell office:value-type="string" calcext:value-type="string">
            <text:p>A basic Probe for the interaction with the Assurance Engine</text:p>
          </table:table-cell>
        </table:table-row>
        <table:table-row table:style-name="ro1">
          <table:table-cell office:value-type="string" calcext:value-type="string">
            <text:p>Fairness-ssh</text:p>
          </table:table-cell>
          <table:table-cell office:value-type="string" calcext:value-type="string">
            <text:p>Uses a dataset to test an ssh installation</text:p>
          </table:table-cell>
        </table:table-row>
        <table:table-row table:style-name="ro1">
          <table:table-cell office:value-type="string" calcext:value-type="string">
            <text:p>Ai-robustness-evasion-fake</text:p>
          </table:table-cell>
          <table:table-cell office:value-type="string" calcext:value-type="string">
            <text:p>testing evasions techniques for a ML based application</text:p>
          </table:table-cell>
        </table:table-row>
        <table:table-row table:style-name="ro1">
          <table:table-cell office:value-type="string" calcext:value-type="string">
            <text:p>Ai-integrity-behavior-simple</text:p>
          </table:table-cell>
          <table:table-cell office:value-type="string" calcext:value-type="string">
            <text:p>Testing integrity for a ML based application</text:p>
          </table:table-cell>
        </table:table-row>
        <table:table-row table:style-name="ro1">
          <table:table-cell office:value-type="string" calcext:value-type="string">
            <text:p>Ai-robustness-poisoning</text:p>
          </table:table-cell>
          <table:table-cell office:value-type="string" calcext:value-type="string">
            <text:p>Testing a ML based application with poisoning</text:p>
          </table:table-cell>
        </table:table-row>
        <table:table-row table:style-name="ro1">
          <table:table-cell office:value-type="string" calcext:value-type="string">
            <text:p>Ai-robustness-evasion</text:p>
          </table:table-cell>
          <table:table-cell office:value-type="string" calcext:value-type="string">
            <text:p>Testing a ML based application with evasion</text:p>
          </table:table-cell>
        </table:table-row>
        <table:table-row table:style-name="ro1">
          <table:table-cell office:value-type="string" calcext:value-type="string">
            <text:p>Mqtt-acl</text:p>
          </table:table-cell>
          <table:table-cell office:value-type="string" calcext:value-type="string">
            <text:p>The probe checks user permissions specified in the ACL file used by the VerneMQ broker. You can specify via the probe JSON input what user you want to check on what topic. If any of the given checks fail, the probe returns an error. <text:s/>\n\nThe VerneMQ *deny-all* ACL file has the following structure: \n```\ntopic public\n\nuser probe\ntopic test\n\nuser admin\ntopic configuration\n```\nThis means that the anonymous user (if enabled) is able to only access the public topic. The probe user can only access the test topic. \n\nThe `check-type` field accepts one of the three following options:\n- **contains**: every rule in `permissions` must also be in the ACL file\n- **matches**: The ACL file must exactly match the `permissions` list given in input\n- **nomatches**: If any of the rules in `permissions` is found in the ACL file, an error is returned</text:p>
          </table:table-cell>
        </table:table-row>
        <table:table-row table:style-name="ro1">
          <table:table-cell office:value-type="string" calcext:value-type="string">
            <text:p>Mqtt-tls-server</text:p>
          </table:table-cell>
          <table:table-cell office:value-type="string" calcext:value-type="string">
            <text:p>The probe has the goal of verifying the probe TLS configuration, checking that TLS is enabled, all the TLS-related files have the right permissions and that the certificates are valid.</text:p>
          </table:table-cell>
        </table:table-row>
        <table:table-row table:style-name="ro1">
          <table:table-cell office:value-type="string" calcext:value-type="string">
            <text:p>Mqtt-fuzzing</text:p>
          </table:table-cell>
          <table:table-cell office:value-type="string" calcext:value-type="string">
            <text:p>The probe performs tests for some unexpected behaviours by sending tailored packets and then testing for the availability of the service. \n\nIt tests for:\n- `CONNECT` packets containing NULL characters in the header (ClientID, Credentials and then topic)\n- `PUBLISH` retained packet containing NULL char, then `SUBSCRIBE` to the topic and verify the message.\n- `SUBSCRIBE` using invalid subscription identifier (0)\n- Packets containing a single char, testing an entire char interval\n- Send raw crafted packets from given dir\n- Send crafted packets defined via given JSON files\n- Connect using a client ID containing a NULL char and verify the acceptance of the connection by subscribing to a topic</text:p>
          </table:table-cell>
        </table:table-row>
        <table:table-row table:style-name="ro1">
          <table:table-cell office:value-type="string" calcext:value-type="string">
            <text:p>Mqtt-cve</text:p>
          </table:table-cell>
          <table:table-cell office:value-type="string" calcext:value-type="string">
            <text:p>The probe verifies the following CVEs:\n- CVE-2021-34432</text:p>
          </table:table-cell>
        </table:table-row>
        <table:table-row table:style-name="ro1">
          <table:table-cell office:value-type="string" calcext:value-type="string">
            <text:p>Mqtt-base-probe</text:p>
          </table:table-cell>
          <table:table-cell office:value-type="string" calcext:value-type="string">
            <text:p>## Performed checks\n\nThe probe performs various tasks:\n- Service availability\n- SSH connection\n- Broker version and MQTT version\n- The user running the broker\n- Anonymous login disabled\n- Logging system enabled\n- MQTT Flow control rules (max inflight messages, queues size, ...)\n- ACL configured\n- Config files owning\n- Broker's config files permissions</text:p>
          </table:table-cell>
        </table:table-row>
        <table:table-row table:style-name="ro1">
          <table:table-cell office:value-type="string" calcext:value-type="string">
            <text:p>Aide-oneshot-new</text:p>
          </table:table-cell>
          <table:table-cell office:value-type="string" calcext:value-type="string">
            <text:p>Checks a specific folder for changes based on the first scan</text:p>
          </table:table-cell>
        </table:table-row>
        <table:table-row table:style-name="ro1">
          <table:table-cell office:value-type="string" calcext:value-type="string">
            <text:p>Heartbleed-new</text:p>
          </table:table-cell>
          <table:table-cell office:value-type="string" calcext:value-type="string">
            <text:p>Checks if the target is vulnerable to Heartbleed, by using a modified version of the venerable [https://github.com/FiloSottile/Heartbleed](https://github.com/FiloSottile/Heartbleed).\n\nThe tool has been modified to emit json, exit codes have changed as well.</text:p>
          </table:table-cell>
        </table:table-row>
        <table:table-row table:style-name="ro1">
          <table:table-cell office:value-type="string" calcext:value-type="string">
            <text:p>Metasploit-new</text:p>
          </table:table-cell>
          <table:table-cell office:value-type="string" calcext:value-type="string">
            <text:p>A probe that does penetrating testing against a target. This only works in container mode, it's not possible to run it locally (missing dependencies)\n\nA driver for `Metasploit`.\n\nThe driver executes penetration testing against the given host. Two modalities are supported:\n\n- `check`: given a list of exploits (auto-generated), just try to figure out if the target is vulnerable\n- `exec`: given a list of exploits (auto-generated) effectively run them against the target.\n\nThe exploits are chosen depending on their `platform`. One can choose among the following platforms (in the form):\n\n- `BSD`\n- `Java`\n- `Linux`\n- `nodejs`\n- `PHP`\n- `Python`\n- `Windows XP`\n- `Windows Server 2003`\n- `Windows Server 2003 r2`\n- `Windows Vista`\n- `Windows 7`\n- `Windows Server 2008`\n- `Windows Server 2008 r2`\n- `Windows 8`\n- `Windows Server 2012`\n- `Windows Server 2012 r2`\n- `Windows 10`\n- `Windows Server 2016`\n- `Windows Server 2019`</text:p>
          </table:table-cell>
        </table:table-row>
        <table:table-row table:style-name="ro1">
          <table:table-cell office:value-type="string" calcext:value-type="string">
            <text:p>Openvas-new</text:p>
          </table:table-cell>
          <table:table-cell office:value-type="string" calcext:value-type="string">
            <text:p>A probe to use `OpenVAS` to manage a vulnerability scanning. Our `OpenVAS` is running at `gsa-service.gvm.svc.cluster.local`, and the probes connect to that server to issue a scan against the given target.\n\nWhile this probe works quite well, there are features that need to be tested:\n\n- support for credential\n- support for `CPEs` and `CVEs`\n\nAlso, this probe has some pros:\n\n- **logging** is enabled, allowing to inspect what has (eventually) went wrong\n- **meaningful exceptions** allowing to report useful messages to the user, such as the `task_id` that can be communicated to use (for debug...)\n <text:s/>- if the connection to the server gets interrupted, thanks to this the team can still inspect the report\n- **safe delete** turned on by default, eliminating every artifact created on the server after the scan is finished\n- **`OpenVAS` configuration through environment variables**, see [Dockerfile](Dockerfile) as an example.</text:p>
          </table:table-cell>
        </table:table-row>
        <table:table-row table:style-name="ro1">
          <table:table-cell office:value-type="string" calcext:value-type="string">
            <text:p>Assurance-engine-basic-probe</text:p>
          </table:table-cell>
          <table:table-cell office:value-type="string" calcext:value-type="string">
            <text:p>A basic Probe for the interaction with the Assurance Engine</text:p>
          </table:table-cell>
        </table:table-row>
        <table:table-row table:style-name="ro1">
          <table:table-cell office:value-type="string" calcext:value-type="string">
            <text:p>Git CI basic probe</text:p>
          </table:table-cell>
          <table:table-cell office:value-type="string" calcext:value-type="string">
            <text:p>A Basic Git CI probe to interact with Git CI pipelines</text:p>
          </table:table-cell>
        </table:table-row>
        <table:table-row table:style-name="ro1">
          <table:table-cell office:value-type="string" calcext:value-type="string">
            <text:p>Basic Git Probe</text:p>
          </table:table-cell>
          <table:table-cell office:value-type="string" calcext:value-type="string">
            <text:p>A basic Git probe, checking the status of a given repo</text:p>
          </table:table-cell>
        </table:table-row>
        <table:table-row table:style-name="ro1">
          <table:table-cell office:value-type="string" calcext:value-type="string">
            <text:p>Git CI Test Injection</text:p>
          </table:table-cell>
          <table:table-cell office:value-type="string" calcext:value-type="string">
            <text:p>A Basic CI-based Probe</text:p>
          </table:table-cell>
        </table:table-row>
        <table:table-row table:style-name="ro1">
          <table:table-cell office:value-type="string" calcext:value-type="string">
            <text:p>ML metric checker</text:p>
          </table:table-cell>
          <table:table-cell office:value-type="string" calcext:value-type="string">
            <text:p>Given a target, executes a ML model and checks performance metrics such as accuracy, precision and recall, determining if they are in the given <text:s/>range</text:p>
          </table:table-cell>
        </table:table-row>
        <table:table-row table:style-name="ro1">
          <table:table-cell office:value-type="string" calcext:value-type="string">
            <text:p>ML Assessment</text:p>
          </table:table-cell>
          <table:table-cell office:value-type="string" calcext:value-type="string">
            <text:p>ML assessment probe</text:p>
          </table:table-cell>
        </table:table-row>
        <table:table-row table:style-name="ro1">
          <table:table-cell office:value-type="string" calcext:value-type="string">
            <text:p>curl</text:p>
          </table:table-cell>
          <table:table-cell office:value-type="string" calcext:value-type="string">
            <text:p>Testing probe using curl</text:p>
          </table:table-cell>
        </table:table-row>
        <table:table-row table:style-name="ro1">
          <table:table-cell office:value-type="string" calcext:value-type="string">
            <text:p>Web-vuln-scan</text:p>
          </table:table-cell>
          <table:table-cell office:value-type="string" calcext:value-type="string">
            <text:p>Tries to extract all the possible technologies used in a website, then it performs a search for CVEs related to the technologies it has found. It uses [https://www.wappalyzer.com/](https://www.wappalyzer.com/) to search for web technologies, then, we use the info provided by the tool to search for CVE matching the technologies (and the version) collected by [<text:a xlink:href="https://www.wappalyzer.com/%5D(https://www.wappalyzer.com/)" xlink:type="simple">https://www.wappalyzer.com/](https://www.wappalyzer.com/)</text:a>.</text:p>
          </table:table-cell>
        </table:table-row>
        <table:table-row table:style-name="ro1">
          <table:table-cell office:value-type="string" calcext:value-type="string">
            <text:p>Lightweight-vuln-scan</text:p>
          </table:table-cell>
          <table:table-cell office:value-type="string" calcext:value-type="string">
            <text:p>Checks which ports are open on the target host (optionally this discovery can be restricted to specific ports) and searches for known vulnerabilities of listening services. A control that uses `nmap` to check which services are running on the target system. Then, if the tool can find the service name and the version, we also search for CVE related to those services.\n\nTCP is always supported, in order to use UDP user *must* provide a list of ports to scan, otherwise no search for UDP is performed.</text:p>
          </table:table-cell>
        </table:table-row>
        <table:table-row table:style-name="ro1">
          <table:table-cell office:value-type="string" calcext:value-type="string">
            <text:p>Inventory-verification</text:p>
          </table:table-cell>
          <table:table-cell office:value-type="string" calcext:value-type="string">
            <text:p>Given a lists of hosts that *should* be found in a discovery, this control does a discovery using `nmap` and then checks whether the hosts it has found perfectly matches the given list.\n\nThe only tool it uses is `nmap`.</text:p>
          </table:table-cell>
        </table:table-row>
        <table:table-row table:style-name="ro1">
          <table:table-cell office:value-type="string" calcext:value-type="string">
            <text:p>observatory</text:p>
          </table:table-cell>
          <table:table-cell office:value-type="string" calcext:value-type="string">
            <text:p>Checks that a website is configured following security guidelines by Mozilla. A control that uses [https://github.com/mozilla/http-observatory](https://github.com/mozilla/http-observatory) to check the healthiness of a web site</text:p>
          </table:table-cell>
        </table:table-row>
        <table:table-row table:style-name="ro1">
          <table:table-cell office:value-type="string" calcext:value-type="string">
            <text:p>ping</text:p>
          </table:table-cell>
          <table:table-cell office:value-type="string" calcext:value-type="string">
            <text:p>Launches a ping on a given target</text:p>
          </table:table-cell>
        </table:table-row>
        <table:table-row table:style-name="ro1">
          <table:table-cell office:value-type="string" calcext:value-type="string">
            <text:p>Disk-free</text:p>
          </table:table-cell>
          <table:table-cell office:value-type="string" calcext:value-type="string">
            <text:p>Check disk usage of a given system</text:p>
          </table:table-cell>
        </table:table-row>
        <table:table-row table:style-name="ro1">
          <table:table-cell office:value-type="string" calcext:value-type="string">
            <text:p>find</text:p>
          </table:table-cell>
          <table:table-cell office:value-type="string" calcext:value-type="string">
            <text:p>Executes the find command on a given target</text:p>
          </table:table-cell>
        </table:table-row>
        <table:table-row table:style-name="ro1">
          <table:table-cell office:value-type="string" calcext:value-type="string">
            <text:p>sslyze</text:p>
          </table:table-cell>
          <table:table-cell office:value-type="string" calcext:value-type="string">
            <text:p>Checks the correct configuration of ths TLS/SSL channel by looking for old versions, weak ciphers, and other misconfigurations. A control that uses [https://github.com/nabla-c0d3/sslyze](https://github.com/nabla-c0d3/sslyze) to analyze the setup of a TLS channel looking for:\n\n- old versions of the protocol\n <text:s/>- only v 1.2 and v 1.3 should be supported, `False` if it supports other versions\n- weak ciphersuites\n <text:s/>- only ciphersuites with `ECDHE` and `AES-GCM` or `CHACHA20-POLY1305` should be supported, `False` if it supports other versions.\n - compression, `False` if enabled.</text:p>
          </table:table-cell>
        </table:table-row>
        <table:table-row table:style-name="ro1">
          <table:table-cell office:value-type="string" calcext:value-type="string">
            <text:p>Ssh-scan</text:p>
          </table:table-cell>
          <table:table-cell office:value-type="string" calcext:value-type="string">
            <text:p>Performs an assessment of the SSH configuration according to Mozilla guidelines and suggest which modification should be applied. A control that uses [https://mozilla.github.io/ssh_scan/](https://mozilla.github.io/ssh_scan/) to asses the SSH configuration of an host.</text:p>
          </table:table-cell>
        </table:table-row>
        <table:table-row table:style-name="ro1">
          <table:table-cell office:value-type="string" calcext:value-type="string">
            <text:p>portlist</text:p>
          </table:table-cell>
          <table:table-cell office:value-type="string" calcext:value-type="string">
            <text:p>A control that checks which TCP and UDP ports are open, and compares them against a whitelist. It is based on `nmap`.</text:p>
          </table:table-cell>
        </table:table-row>
        <table:table-row table:style-name="ro1">
          <table:table-cell office:value-type="string" calcext:value-type="string">
            <text:p>Wp-scan</text:p>
          </table:table-cell>
          <table:table-cell office:value-type="string" calcext:value-type="string">
            <text:p>This control uses [https://wpscan.org/](https://wpscan.org/) to scan for vulnerabilities in WordPress.</text:p>
          </table:table-cell>
        </table:table-row>
        <table:table-row table:style-name="ro1">
          <table:table-cell office:value-type="string" calcext:value-type="string">
            <text:p>infowebsite</text:p>
          </table:table-cell>
          <table:table-cell office:value-type="string" calcext:value-type="string">
            <text:p>Tries to extract as much information as it can from a website, including CMS, libraries, and so on. A driver for [https://www.wappalyzer.com/](https://www.wappalyzer.com/). Since `wappalyzer` is written in JS, the driver requires `NodeJS` as well.\n\n**Warning**:\n\n- `wappalyzer` is written in NodeJS and it does not offer a *stable* CLI, therefore we need to write our own wrapper and *freeze* the version of `wappalyzer` since API may change (as I have experimented).</text:p>
          </table:table-cell>
        </table:table-row>
        <table:table-row table:style-name="ro1">
          <table:table-cell office:value-type="string" calcext:value-type="string">
            <text:p>unimiwebsite</text:p>
          </table:table-cell>
          <table:table-cell office:value-type="string" calcext:value-type="string">
            <text:p>A probe to check the availability of a page on unimi website. Since the unimi website sometimes it's quite strange (for example it prints an error page but it returns a `200 OK`), we need a specific probe to check the availability</text:p>
          </table:table-cell>
        </table:table-row>
        <table:table-row table:style-name="ro1">
          <table:table-cell office:value-type="string" calcext:value-type="string">
            <text:p>openscap</text:p>
          </table:table-cell>
          <table:table-cell office:value-type="string" calcext:value-type="string">
            <text:p>A probe that executes OpenSCAP on the target host.</text:p>
          </table:table-cell>
        </table:table-row>
        <table:table-row table:style-name="ro1">
          <table:table-cell office:value-type="string" calcext:value-type="string">
            <text:p>Joomla-checker-1</text:p>
          </table:table-cell>
          <table:table-cell office:value-type="string" calcext:value-type="string">
            <text:p>A control that uses [https://github.com/rastating/joomlavs](https://github.com/rastating/joomlavs) to scan for `Joomla` vulnerabilities.</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Free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2T09:28:49.191843639</meta:creation-date>
    <meta:generator>LibreOffice/7.4.7.2$Linux_X86_64 LibreOffice_project/40$Build-2</meta:generator>
    <dc:date>2025-03-13T10:07:17.601516990</dc:date>
    <meta:editing-duration>PT2H52M35S</meta:editing-duration>
    <meta:editing-cycles>4</meta:editing-cycles>
    <meta:document-statistic meta:table-count="1" meta:cell-count="80" meta:object-count="0"/>
  </office:meta>
</office:document-meta>
</file>