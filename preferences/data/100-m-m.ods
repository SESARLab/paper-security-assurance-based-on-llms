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089in"/>
    </style:style>
    <style:style style:name="co2" style:family="table-column">
      <style:table-column-properties fo:break-before="auto" style:column-width="6.35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5.6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</table:table-row>
        <table:table-row table:style-name="ro2">
          <table:table-cell office:value-type="string" calcext:value-type="string">
            <text:p>R0: 10.3.14.1</text:p>
            <text:p>    - PfSense installation (DHCP server, Apache admin panel on port 443, WAF, DNS)</text:p>
            <text:p>    </text:p>
            <text:p>Host1: 10.3.14.10 </text:p>
            <text:p>    - Application server (nginx port 443)</text:p>
            <text:p>    </text:p>
            <text:p>Host2: 10.3.14.11  </text:p>
            <text:p>    - Primary Database server (MySQL)</text:p>
            <text:p>    - VerneMQ MQTT Broker (on port 1338)</text:p>
            <text:p>    </text:p>
            <text:p>Host3: 143.34.2.1 </text:p>
            <text:p>    - Cache server (AWS ElastiCache port 5600)</text:p>
            <text:p>    - Logging server (AWS ElasticSearch port 8088)</text:p>
            <text:p>    </text:p>
            <text:p>Host4: 10.3.14.13  </text:p>
            <text:p>    - Load balancer (Traefik port 3000)</text:p>
            <text:p>    - API Gateway (Traefik port 3000)</text:p>
            <text:p>    </text:p>
            <text:p>Host5: 56.3.1.42  </text:p>
            <text:p>    - Backup server (AWS Backup bucket port 8000)</text:p>
            <text:p>    </text:p>
            <text:p>Host6: 10.3.14.15  </text:p>
            <text:p>    - Monitoring server (Grafana on Apache Web server on port 1337)</text:p>
            <text:p>    - Mosquitto MQTT Broker (on port 1338)</text:p>
            <text:p>    - Secondary Database server (MySQL)</text:p>
            <text:p>    </text:p>
            <text:p>Host7: 10.3.14.16  </text:p>
            <text:p>    - File storage server (PostgresSQL on port 8080)</text:p>
            <text:p>    - VerneMQ MQTT Broker (on port 8338) </text:p>
            <text:p>    </text:p>
            <text:p>Host8: 10.3.14.17</text:p>
            <text:p>    - LLM model API (on port 9090)</text:p>
            <text:p>    </text:p>
            <text:p><text:span text:style-name="T1">Every host can be accessed via ssh on port 2222</text:span></text:p>
            <text:p><text:span text:style-name="T1">    </text:span></text:p>
            <text:p><text:span text:style-name="T1">Test the LLM against poison attacks. Verify that all the MQTT broker installations are secure. Verify the channel's confidentiality for all the Apache installations.</text:span></text:p>
          </table:table-cell>
          <table:table-cell office:value-type="string" calcext:value-type="string">
            <text:p>[</text:p>
            <text:p>        {"host": "10.3.14.17 - LLM model API", "probe": "ai-robustness-poisoning"},</text:p>
            <text:p>        {"host": "10.3.14.11 - VerneMQ", "probe": "vernemq-base-probe"},</text:p>
            <text:p>        {"host": "10.3.14.11 - VerneMQ", "probe": "vernemq-acl"},</text:p>
            <text:p>        {"host": "10.3.14.11 - VerneMQ", "probe": "vernemq-tls-server"},</text:p>
            <text:p>        {"host": "10.3.14.11 - VerneMQ", "probe": "vernemq-cve"},</text:p>
            <text:p>        {"host": "10.3.14.11 - VerneMQ", "probe": "vernemq-fuzzing"},</text:p>
            <text:p>        {"host": "10.3.14.16 - VerneMQ", "probe": "vernemq-base-probe"},</text:p>
            <text:p>        {"host": "10.3.14.16 - VerneMQ", "probe": "vernemq-acl"},</text:p>
            <text:p>        {"host": "10.3.14.16 - VerneMQ", "probe": "vernemq-tls-server"},</text:p>
            <text:p>        {"host": "10.3.14.16 - VerneMQ", "probe": "vernemq-cve"},</text:p>
            <text:p>        {"host": "10.3.14.16 - VerneMQ", "probe": "vernemq-fuzzing"},</text:p>
            <text:p>        {"host": "10.3.14.15 - Mosquitto", "probe": "mosquitto-base-probe"},</text:p>
            <text:p>        {"host": "10.3.14.1 - PfSense", "probe": "sslyze"},</text:p>
            <text:p>        {"host": "10.3.14.15 - Apache Web server", "probe": "sslyze"}</text:p>
            <text:p>    ]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MQTT brokers are available and the anonymous login is disabled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1 - VerneMQ", "probe": "vernemq-base-probe"},</text:span></text:p>
            <text:p><text:span text:style-name="T1">        {"host": "10.3.14.16 - VerneMQ", "probe": "vernemq-base-probe"},</text:span></text:p>
            <text:p><text:span text:style-name="T1">        {"host": "10.3.14.15 - Mosquitto", "probe": "mosquitto-base-probe"}</text:span></text:p>
            <text:p><text:span text:style-name="T1">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e Dbs configurations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1 - MySQL", "probe": "mysql-conf"},</text:span></text:p>
            <text:p><text:span text:style-name="T1">        {"host": "10.3.14.15 - MySQL", "probe": "mysql-conf"},</text:span></text:p>
            <text:p><text:span text:style-name="T1">        {"host": "10.3.14.16 – File storage server", "probe": "postgressql-confl"}</text:span></text:p>
            <text:p><text:span text:style-name="T1">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only the Nginx web servers are not vulnerable to known attacks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0 – Nginx", "probe": "lightweidht-vuln-scan"},</text:span></text:p>
            <text:p><text:span text:style-name="T1">        {"host": "10.3.14.10 - Nginx", "probe": "web-vuln-scan"},</text:span></text:p>
            <text:p><text:span text:style-name="T1">        {"host": "10.3.14.10 – Nginxr", "probe": "heartbleed-newl"}</text:span></text:p>
            <text:p><text:span text:style-name="T1">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LLM model performs with all indexes of 0.9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7 – LLM Model API", "probe": "ML metric checker"}</text:span></text:p>
            <text:p><text:span text:style-name="T1">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re are no setuid files on host7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6 – Host7", "probe": "find"}</text:span></text:p>
            <text:p><text:span text:style-name="T1">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VerneMQ brokers are not vulnerable to fuzzing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1 – VerneMQ MQTT BrokerI", "probe": "vernemq-fuzzingr"},</text:span></text:p>
            <text:p><text:span text:style-name="T1">        {"host": "10.3.14.16 - VerneMQ", "probe": "vernemq-fuzzing"}</text:span></text:p>
            <text:p><text:span text:style-name="T1">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logging is enable on Mosquitto brokers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5 – Mosquitto MQTT broker", "probe": "mosquitto-base-probe"}</text:span></text:p>
            <text:p><text:span text:style-name="T1">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e network inventory, verify that ssh is correctly configured on the hosts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All", "probe": "inventory-verification"},</text:span></text:p>
            <text:p><text:span text:style-name="T1">        {"host": "10.3.14.1 - R0", "probe": "ssh-scan"},</text:span></text:p>
            <text:p><text:span text:style-name="T1">        {"host": "10.3.14.10 - Host1", "probe": "ssh-scan"},</text:span></text:p>
            <text:p><text:span text:style-name="T1">        {"host": "143.34.2.1 - Host3", "probe": "ssh-scan"},</text:span></text:p>
            <text:p><text:span text:style-name="T1">        {"host": "10.3.14.11 - Host2", "probe": "ssh-scan"},</text:span></text:p>
            <text:p><text:span text:style-name="T1">        {"host": "10.3.14.13 - Host4", "probe": "ssh-scan"},</text:span></text:p>
            <text:p><text:span text:style-name="T1">        {"host": "56.3.1.42 - Host5", "probe": "ssh-scan"},</text:span></text:p>
            <text:p><text:span text:style-name="T1">        {"host": "10.3.14.15 - Host6", "probe": "ssh-scan"},</text:span></text:p>
            <text:p><text:span text:style-name="T1">        {"host": "10.3.14.16 - Host7", "probe": "ssh-scan"},</text:span></text:p>
            <text:p><text:span text:style-name="T1">        {"host": "10.3.14.17 - Host8", "probe": "ssh-scan"}</text:span></text:p>
            <text:p><text:span text:style-name="T1">    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API gateway is secure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 – Nginx", "probe": "lightweidht-vuln-scan"},</text:span></text:p>
            <text:p><text:span text:style-name="T1">        {"host": "10.3.14.1 - Nginx", "probe": "web-vuln-scan"},</text:span></text:p>
            <text:p><text:span text:style-name="T1">        {"host": "10.3.14.1 – Nginxr", "probe": "heartbleed-newl"}</text:span></text:p>
            <text:p><text:span text:style-name="T1">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Extract all the available information from the web servers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 - Pfsense", "probe": "infowebsite"},</text:span></text:p>
            <text:p><text:span text:style-name="T1">        {"host": "10.3.14.10 - Nginx", "probe": "infowebsite"},</text:span></text:p>
            <text:p><text:span text:style-name="T1">        {"host": "10.3.14.13 – API Gateway", "probe": "infowebsite"},</text:span></text:p>
            <text:p><text:span text:style-name="T1">        {"host": "10.3.14.15 – Grafana on Apache", "probe": "infowebsite"}</text:span></text:p>
            <text:p><text:span text:style-name="T1">    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e file system’s integrity on all hosts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 - R0", "probe": "aide-oneshot-new"},</text:span></text:p>
            <text:p><text:span text:style-name="T1">        {"host": "10.3.14.10 - Host1", "probe": "aide-oneshot-new"},</text:span></text:p>
            <text:p><text:span text:style-name="T1">        {"host": "143.34.2.1 - Host3", "probe": "aide-oneshot-new"},</text:span></text:p>
            <text:p><text:span text:style-name="T1">        {"host": "10.3.14.11 - Host2", "probe": "aide-oneshot-new"},</text:span></text:p>
            <text:p><text:span text:style-name="T1">        {"host": "10.3.14.13 - Host4", "probe": "aide-oneshot-new"},</text:span></text:p>
            <text:p><text:span text:style-name="T1">        {"host": "56.3.1.42 - Host5", "probe": "aide-oneshot-new"},</text:span></text:p>
            <text:p><text:span text:style-name="T1">        {"host": "10.3.14.15 - Host6", "probe": "aide-oneshot-new"},</text:span></text:p>
            <text:p><text:span text:style-name="T1">        {"host": "10.3.14.16 - Host7", "probe": "aide-oneshot-new"},</text:span></text:p>
            <text:p><text:span text:style-name="T1">        {"host": "10.3.14.17 - Host8", "probe": "aide-oneshot-new"}</text:span></text:p>
            <text:p><text:span text:style-name="T1">    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alidate VerneMQ TLS setup and check for potential CVEs.</text:span></text:p>
          </table:table-cell>
          <table:table-cell office:value-type="string" calcext:value-type="string">
            <text:p>[</text:p>
            <text:p>  {"host": "10.3.14.11 – VerneMQ", "probe": "vernemq-tls-server"},</text:p>
            <text:p><text:span text:style-name="T1">  {"host": "10.3.14.11 – VerneMQ", "probe": "vernemq-cve"},{"host": "10.3.14.16 – VerneMQ", "probe": "vernemq-tls-server"},</text:span></text:p>
            <text:p><text:span text:style-name="T1">  {"host": "10.3.14.16 – VerneMQ", "probe": "vernemq-cve"}</text:span>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Check integrity and poisoning robustness of deployed LLM model</text:span></text:p>
          </table:table-cell>
          <table:table-cell office:value-type="string" calcext:value-type="string">
            <text:p>[</text:p>
            <text:p>  {"host": "10.3.14.17 – LLM Model API", "probe": "ai-integrity-behavior-simple"},</text:p>
            <text:p>  {"host": "10.3.14.17 – LLM Model API", "probe": "ai-robustness-poisoning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Assess SSH service security on host7 and test against evasion techniques.</text:span></text:p>
          </table:table-cell>
          <table:table-cell office:value-type="string" calcext:value-type="string">
            <text:p>[</text:p>
            <text:p>  {"host": "10.3.14.16 – Host7", "probe": "ssh-scan"},</text:p>
            <text:p>  {"host": "10.3.14.16 – Host7", "probe": "ai-robustness-evasion-fak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Scan for potential vulnerabilites on VerneMQ installations</text:span></text:p>
          </table:table-cell>
          <table:table-cell office:value-type="string" calcext:value-type="string">
            <text:p>[</text:p>
            <text:p>  {"host": "10.3.14.11 – VerneMQ MQTT Broker", "probe": "vernemq-cve"},</text:p>
            <text:p>  {"host": "10.3.14.12 – VerneMQT MQTT Broker", "probe": "vernemq-cv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Evaluate OpenVAS scan results and verify disk usage on host1</text:span></text:p>
          </table:table-cell>
          <table:table-cell office:value-type="string" calcext:value-type="string">
            <text:p>[</text:p>
            <text:p>  {"host": "10.3.14.15 – Host1", "probe": "openvas-new"},</text:p>
            <text:p>  {"host": "10.3.14.15 – Host1", "probe": "disk-fre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Assess Git CI pipeline security and integrity on host7</text:span></text:p>
          </table:table-cell>
          <table:table-cell office:value-type="string" calcext:value-type="string">
            <text:p>[</text:p>
            <text:p>  {"host": "10.3.14.16 – Git Server", "probe": "Git CI basic probe"},</text:p>
            <text:p>  {"host": "10.3.14.16 – Git Server", "probe": "Git CI Test Injection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Confirm ACL configurations and verify probe base for VerneMQ on host2</text:span></text:p>
          </table:table-cell>
          <table:table-cell office:value-type="string" calcext:value-type="string">
            <text:p>[</text:p>
            <text:p>  {"host": "10.3.14.11 – VerneMQ", "probe": "vernemq-acl"},</text:p>
            <text:p>  {"host": "10.3.14.11 – VerneMQ", "probe": "vernemq-base-prob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Perform Metasploit test on Mosquitto MQTT broker.</text:span></text:p>
          </table:table-cell>
          <table:table-cell office:value-type="string" calcext:value-type="string">
            <text:p>[</text:p>
            <text:p>  {"host": "10.3.14.15 – Mosquitto MQTT Broker", "probe": "metasploit-ne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Check TLS settings on the LLM API and evaluate with sslyze.</text:span></text:p>
          </table:table-cell>
          <table:table-cell office:value-type="string" calcext:value-type="string">
            <text:p>[</text:p>
            <text:p>  {"host": "10.3.14.17 – LLM Model API", "probe": "sslyz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Run lightweight vulnerability scan on Nginx host.</text:span></text:p>
          </table:table-cell>
          <table:table-cell office:value-type="string" calcext:value-type="string">
            <text:p>[</text:p>
            <text:p>  {"host": "10.3.14.10 – Nginx", "probe": "lightweight-vuln-scan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Perform a full integrity baseline scan across LLM API and Host7, also ensure assurance engine hooks are active</text:span></text:p>
          </table:table-cell>
          <table:table-cell office:value-type="string" calcext:value-type="string">
            <text:p>[</text:p>
            <text:p>  {"host": "10.3.14.17 – LLM Model API", "probe": "aide-oneshot-new"},</text:p>
            <text:p>  {"host": "10.3.14.16 – Host7", "probe": "aide-oneshot-new"},</text:p>
            <text:p>  {"host": "10.3.14.17 – LLM Model API", "probe": "assurance-engine-basic-probe"},</text:p>
            <text:p>  {"host": "10.3.14.16 – Host7", "probe": "assurance-engine-basic-prob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Check for outdated TLS configurations across LLM API and Nginx</text:span></text:p>
          </table:table-cell>
          <table:table-cell office:value-type="string" calcext:value-type="string">
            <text:p>[</text:p>
            <text:p>  {"host": "10.3.14.17 – LLM Model API", "probe": "sslyze"},</text:p>
            <text:p>  {"host": "10.3.14.10 – Nginx", "probe": "sslyz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Launch curl-based basic reachability checks and analyze web fingerprinting on Nginx</text:span></text:p>
          </table:table-cell>
          <table:table-cell office:value-type="string" calcext:value-type="string">
            <text:p>[</text:p>
            <text:p>  {"host": "10.3.14.10 – Nginx", "probe": "curl"},</text:p>
            <text:p>  {"host": "10.3.14.10 – Nginx", "probe": "infowebsit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Identify network-wide SSH misconfigurations, ensure none of the nodes expose weak settings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7 – Every host", "probe": "ssh-scan"},</text:span></text:p>
            <text:p><text:span text:style-name="T1">        {"host": "10.3.14.11 - VerneMQ", "probe": "vernemq-base-probe"},</text:span></text:p>
            <text:p><text:span text:style-name="T1">        {"host": "10.3.14.11 - VerneMQ", "probe": "vernemq-acl"},</text:span></text:p>
            <text:p><text:span text:style-name="T1">        {"host": "10.3.14.16 - VerneMQ", "probe": "vernemq-base-probe"},</text:span></text:p>
            <text:p><text:span text:style-name="T1">        {"host": "10.3.14.16 - VerneMQ", "probe": "vernemq-acl"},</text:span></text:p>
            <text:p><text:span text:style-name="T1">        {"host": "10.3.14.15 - Mosquitto", "probe": "mosquitto-base-probe"},</text:span></text:p>
            <text:p><text:span text:style-name="T1">        {"host": "10.3.14.1 – Apache admin panel", "probe": "apache-cis"},</text:span></text:p>
            <text:p><text:span text:style-name="T1">        {"host": "10.3.14.15 - Apache Web server", "probe": "apache-cis"}</text:span></text:p>
            <text:p><text:span text:style-name="T1">    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Run Prometheus metric bounds checks on Host7 to validate system health.</text:span></text:p>
          </table:table-cell>
          <table:table-cell office:value-type="string" calcext:value-type="string">
            <text:p>[</text:p>
            <text:p>  {"host": "10.3.14.16 – Host7", "probe": "Prometheus Ra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Perform comprehensive ACL check and MQTT fuzzing for VerneMQ  brokers.</text:span></text:p>
          </table:table-cell>
          <table:table-cell office:value-type="string" calcext:value-type="string">
            <text:p>[</text:p>
            <text:p>  {"host": "10.3.14.11 – VerneMQ", "probe": "vernemq-acl"},</text:p>
            <text:p>  {"host": "10.3.14.11 – VerneMQ", "probe": "vernemq-fuzzing"},</text:p>
            <text:p><text:span text:style-name="T1">  {"host": "10.3.14.16 – VerneMQr", "probe": "vernemq-fuzzing"}, {"host": "10.3.14.15 – VerneMQ", "probe": "vernemq-acl"}</text:span>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Conduct a vulnerability triage using Metasploit and OpenVAS across Nginx and Mosquitto brokers</text:span></text:p>
          </table:table-cell>
          <table:table-cell office:value-type="string" calcext:value-type="string">
            <text:p>[</text:p>
            <text:p>  {"host": "10.3.14.10 – Nginx", "probe": "metasploit-new"},</text:p>
            <text:p>  {"host": "10.3.14.10 – Nginx", "probe": "openvas-new"},</text:p>
            <text:p>  {"host": "10.3.14.15 – Mosquitto MQTT Broker", "probe": "metasploit-new"},</text:p>
            <text:p>  {"host": "10.3.14.15 – Mosquitto MQTT Broker", "probe": "openvas-ne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CIS compliance for Apache web servers</text:span></text:p>
          </table:table-cell>
          <table:table-cell office:value-type="string" calcext:value-type="string">
            <text:p>[</text:p>
            <text:p>  {"host": "10.3.14.1 – Nginx", "probe": "apache-cis"},</text:p>
            <text:p>  {"host": "10.3.14.15 – Nginx", "probe": "apache-cis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Check if Host7 and VerneMQ on host2 are leaking information via misconfigured TLS</text:span></text:p>
          </table:table-cell>
          <table:table-cell office:value-type="string" calcext:value-type="string">
            <text:p><text:span text:style-name="T1">[</text:span></text:p>
            <text:p><text:span text:style-name="T1">  {"host": "10.3.14.16 – Host7", "probe": "sslyze"},</text:span></text:p>
            <text:p><text:span text:style-name="T1">  {"host": "10.3.14.11 – VerneMQ", "probe": "vernemq-tls-server"}</text:span></text:p>
            <text:p><text:span text:style-name="T1">]</text:span>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Mosquitto broker is using TLS, has a proper ACL, and is exposing Prometheus metrics</text:span></text:p>
          </table:table-cell>
          <table:table-cell office:value-type="string" calcext:value-type="string">
            <text:p>[</text:p>
            <text:p>  {"host": "10.3.14.15 - Mosquitto broker", "probe": "mosquitto-base-probe"},</text:p>
            <text:p>  {"host": "10.3.14.15 - Mosquitto broker", "probe": "vernemq-tls-server"},</text:p>
            <text:p>  {"host": "10.3.14.15 - Mosquitto broker", "probe": "vernemq-acl"},</text:p>
            <text:p>  {"host": "10.3.14.15 - Prometheus metrics", "probe": "Prometheus Ra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R0 has its WAF configuration checked against known attack patterns.</text:span></text:p>
          </table:table-cell>
          <table:table-cell office:value-type="string" calcext:value-type="string">
            <text:p>[</text:p>
            <text:p>  {"host": "10.3.14.1", "probe": "pfsense-waf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MQTT broker running on Host2 is tested for TLS, ACL usage, CVEs, and unexpected behaviors</text:span></text:p>
          </table:table-cell>
          <table:table-cell office:value-type="string" calcext:value-type="string">
            <text:p>[</text:p>
            <text:p>  {"host": "10.3.14.11", "probe": "vernemq-tls-server"},</text:p>
            <text:p>  {"host": "10.3.14.11", "probe": "vernemq-acl"},</text:p>
            <text:p>  {"host": "10.3.14.11", "probe": "vernemq-cve"},</text:p>
            <text:p>  {"host": "10.3.14.11", "probe": "vernemq-fuzzing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Host6 is running a compliant MySQL configuration and has a functioning Mosquitto broker setup</text:span></text:p>
          </table:table-cell>
          <table:table-cell office:value-type="string" calcext:value-type="string">
            <text:p>[</text:p>
            <text:p>  {"host": "10.3.14.15", "probe": "mysql-conf"},</text:p>
            <text:p>  {"host": "10.3.14.15", "probe": "mosquitto-base-prob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nginx server on Host1 is configured securely according to best practices</text:span></text:p>
          </table:table-cell>
          <table:table-cell office:value-type="string" calcext:value-type="string">
            <text:p>[</text:p>
            <text:p>  {"host": "10.3.14.10", "probe": "nginx-conf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Host8, which serves a machine learning model API, is evaluated for integrity and evasion attacks.</text:span></text:p>
          </table:table-cell>
          <table:table-cell office:value-type="string" calcext:value-type="string">
            <text:p>[</text:p>
            <text:p>  {"host": "10.3.14.17", "probe": "ai-integrity-behavior-simple"},</text:p>
            <text:p>  {"host": "10.3.14.17", "probe": "ai-robustness-evasion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Host4 serving Traefik as API gateway and load balancer has been assessed using OpenVAS and Heartbleed probes</text:span></text:p>
          </table:table-cell>
          <table:table-cell office:value-type="string" calcext:value-type="string">
            <text:p>[</text:p>
            <text:p>  {"host": "10.3.14.13", "probe": "openvas-new"},</text:p>
            <text:p>  {"host": "10.3.14.13", "probe": "heartbleed-ne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Apache admin panel on R0 is checked against CIS benchmarks and TLS misconfigurations</text:span></text:p>
          </table:table-cell>
          <table:table-cell office:value-type="string" calcext:value-type="string">
            <text:p>[</text:p>
            <text:p>  {"host": "10.3.14.1", "probe": "apache-cis"},</text:p>
            <text:p>  {"host": "10.3.14.1", "probe": "sslyz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all hosts are reachable over SSH on port 2222 and comply with Mozilla SSH guidelin</text:span></text:p>
          </table:table-cell>
          <table:table-cell office:value-type="string" calcext:value-type="string">
            <text:p>[</text:p>
            <text:p>  {"host": "10.3.14.1", "probe": "ssh-scan"},</text:p>
            <text:p>  {"host": "10.3.14.10", "probe": "ssh-scan"},</text:p>
            <text:p>  {"host": "10.3.14.11", "probe": "ssh-scan"},</text:p>
            <text:p>  {"host": "143.34.2.1", "probe": "ssh-scan"},</text:p>
            <text:p>  {"host": "10.3.14.13", "probe": "ssh-scan"},</text:p>
            <text:p>  {"host": "56.3.1.42", "probe": "ssh-scan"},</text:p>
            <text:p>  {"host": "10.3.14.15", "probe": "ssh-scan"},</text:p>
            <text:p>  {"host": "10.3.14.16", "probe": "ssh-scan"},</text:p>
            <text:p>  {"host": "10.3.14.17", "probe": "ssh-scan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host2 machine hosting the main message queue for devices has no CVEs and uses proper TLS settings</text:span></text:p>
          </table:table-cell>
          <table:table-cell office:value-type="string" calcext:value-type="string">
            <text:p><text:span text:style-name="T1">[</text:span></text:p>
            <text:p><text:span text:style-name="T1">  {"host": "10.3.14.11", "probe": "vernemq-cve"},</text:span></text:p>
            <text:p><text:span text:style-name="T1">  {"host": "10.3.14.11", "probe": "vernemq-tls-server"}</text:span></text:p>
            <text:p><text:span text:style-name="T1">]</text:span>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load distribution and API entrypoint node are scanned for known vulnerabilities and outdated TLS protocols.</text:span></text:p>
          </table:table-cell>
          <table:table-cell office:value-type="string" calcext:value-type="string">
            <text:p>[</text:p>
            <text:p>  {"host": "10.3.14.13", "probe": "openvas-new"},</text:p>
            <text:p>  {"host": "10.3.14.13", "probe": "sslyz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host running the caching and centralized logging services has secure port exposure and a valid TLS configuration</text:span></text:p>
          </table:table-cell>
          <table:table-cell office:value-type="string" calcext:value-type="string">
            <text:p>[</text:p>
            <text:p>  {"host": "143.34.2.1", "probe": "portlist"},</text:p>
            <text:p>  {"host": "143.34.2.1", "probe": "sslyz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primary database instance for the application meets MySQL config standards and hasn't been tampered with.</text:span></text:p>
          </table:table-cell>
          <table:table-cell office:value-type="string" calcext:value-type="string">
            <text:p>[</text:p>
            <text:p>  {"host": "10.3.14.11", "probe": "mysql-conf"},</text:p>
            <text:p>  {"host": "10.3.14.11", "probe": "aide-oneshot-ne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system handling external model inference is robust against evasion and model poisoning.</text:span></text:p>
          </table:table-cell>
          <table:table-cell office:value-type="string" calcext:value-type="string">
            <text:p>[</text:p>
            <text:p>  {"host": "10.3.14.17", "probe": "ai-robustness-evasion"},</text:p>
            <text:p>  {"host": "10.3.14.17", "probe": "ai-robustness-poisoning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server responsible for cloud backup storage enforces secure file access and TLS configuration.</text:span></text:p>
          </table:table-cell>
          <table:table-cell office:value-type="string" calcext:value-type="string">
            <text:p>[</text:p>
            <text:p>  {"host": "56.3.1.42", "probe": "sslyze"},</text:p>
            <text:p>  {"host": "56.3.1.42", "probe": "aide-oneshot-ne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host supporting system-level monitoring and MQTT fallback service is free of file integrity violations and follows best practices.</text:span></text:p>
          </table:table-cell>
          <table:table-cell office:value-type="string" calcext:value-type="string">
            <text:p>[</text:p>
            <text:p>  {"host": "10.3.14.15", "probe": "aide-oneshot-new"},</text:p>
            <text:p>  {"host": "10.3.14.15", "probe": "mosquitto-base-prob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server used for file storage and secondary message brokering has compliant configuration for SQL and MQTT</text:span></text:p>
          </table:table-cell>
          <table:table-cell office:value-type="string" calcext:value-type="string">
            <text:p>[</text:p>
            <text:p>  {"host": "10.3.14.16", "probe": "postgressql-conf"},</text:p>
            <text:p>  {"host": "10.3.14.16", "probe": "vernemq-base-prob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all systems with a public IP are reachable via SSH and do not use outdated cipher suites.</text:span></text:p>
          </table:table-cell>
          <table:table-cell office:value-type="string" calcext:value-type="string">
            <text:p>[</text:p>
            <text:p>  {"host": "143.34.2.1", "probe": "ssh-scan"},</text:p>
            <text:p>  {"host": "56.3.1.42", "probe": "ssh-scan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system responsible for firewalling, DNS, and admin panel access complies with both CIS and pfSense hardening practices.</text:span></text:p>
          </table:table-cell>
          <table:table-cell office:value-type="string" calcext:value-type="string">
            <text:p>[</text:p>
            <text:p>  {"host": "10.3.14.1", "probe": "apache-cis"},</text:p>
            <text:p>  {"host": "10.3.14.1", "probe": "pfsense-audit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broker on host7 used for secondary message queuing adheres to both CVE mitigation and ACL-based authorization practices.</text:span></text:p>
          </table:table-cell>
          <table:table-cell office:value-type="string" calcext:value-type="string">
            <text:p>[</text:p>
            <text:p>  {"host": "10.3.14.16", "probe": "vernemq-cve"},</text:p>
            <text:p>  {"host": "10.3.14.16", "probe": "vernemq-acl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infrastructure node managing backups and long-term storage is safe from misconfiguration and remote memory disclosure.</text:span></text:p>
          </table:table-cell>
          <table:table-cell office:value-type="string" calcext:value-type="string">
            <text:p>[</text:p>
            <text:p>  {"host": "56.3.1.42", "probe": "aide-oneshot-new"},</text:p>
            <text:p>  {"host": "56.3.1.42", "probe": "heartbleed-ne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host storing the main application state is not running with a vulnerable SQL engine and that integrity scans pass.</text:span></text:p>
          </table:table-cell>
          <table:table-cell office:value-type="string" calcext:value-type="string">
            <text:p>[</text:p>
            <text:p>  {"host": "10.3.14.11", "probe": "mysql-conf"},</text:p>
            <text:p>  {"host": "10.3.14.11", "probe": "aide-oneshot-ne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host1 managing both application logic and TLS-protected endpoints passes vulnerability scans and follows TLS hardening</text:span></text:p>
          </table:table-cell>
          <table:table-cell office:value-type="string" calcext:value-type="string">
            <text:p>[</text:p>
            <text:p>  {"host": "10.3.14.10", "probe": "sslyze"},</text:p>
            <text:p>  {"host": "10.3.14.10", "probe": "openvas-ne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host acting as a frontend cache and log aggregator maintains secure exposure and no vulnerability leakage</text:span></text:p>
          </table:table-cell>
          <table:table-cell office:value-type="string" calcext:value-type="string">
            <text:p>[</text:p>
            <text:p>  {"host": "143.34.2.1", "probe": "web-vuln-scan"},</text:p>
            <text:p>  {"host": "143.34.2.1", "probe": "aide-oneshot-ne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endpoint responsible for model interaction is robust against both direct evasions and poisoning vectors.</text:span></text:p>
          </table:table-cell>
          <table:table-cell office:value-type="string" calcext:value-type="string">
            <text:p>[</text:p>
            <text:p>  {"host": "10.3.14.17", "probe": "ai-robustness-evasion"},</text:p>
            <text:p>  {"host": "10.3.14.17", "probe": "ai-robustness-poisoning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infrastructure component managing system-wide access policies enforces SSH and firewall compliance</text:span></text:p>
          </table:table-cell>
          <table:table-cell office:value-type="string" calcext:value-type="string">
            <text:p>[</text:p>
            <text:p>  {"host": "10.3.14.1", "probe": "fairness-ssh"},</text:p>
            <text:p><text:span text:style-name="T1">  {"host": "10.3.14.1", "probe": "pfsense-audit"}, {"host": "10.3.14.1", "probe": "pfsense-waf"}</text:span>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secondary data store does not expose vulnerable SQL configurations or web interfaces.</text:span></text:p>
          </table:table-cell>
          <table:table-cell office:value-type="string" calcext:value-type="string">
            <text:p>[</text:p>
            <text:p>  {"host": "10.3.14.16", "probe": "mysql-conf"},</text:p>
            <text:p>  {"host": "10.3.14.16", "probe": "apache-cis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system handling public-facing TLS ingress follows hardened certificate and cipher configuration</text:span></text:p>
          </table:table-cell>
          <table:table-cell office:value-type="string" calcext:value-type="string">
            <text:p>[</text:p>
            <text:p>  {"host": "10.3.14.13", "probe": "sslyz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each host maintains nominal disk usage and does not contain unauthorized setuid files across its file systems</text:span></text:p>
          </table:table-cell>
          <table:table-cell office:value-type="string" calcext:value-type="string">
            <text:p>[</text:p>
            <text:p>  {"host": "10.3.14.1", "probe": "disk-free"},</text:p>
            <text:p>  {"host": "10.3.14.1", "probe": "find"},</text:p>
            <text:p>  </text:p>
            <text:p>  {"host": "10.3.14.10", "probe": "disk-free"},</text:p>
            <text:p>  {"host": "10.3.14.10", "probe": "find"},</text:p>
            <text:p>  </text:p>
            <text:p>  {"host": "10.3.14.11", "probe": "disk-free"},</text:p>
            <text:p>  {"host": "10.3.14.11", "probe": "find"},</text:p>
            <text:p>  </text:p>
            <text:p>  {"host": "143.34.2.1", "probe": "disk-free"},</text:p>
            <text:p>  {"host": "143.34.2.1", "probe": "find"},</text:p>
            <text:p>  </text:p>
            <text:p>  {"host": "10.3.14.13", "probe": "disk-free"},</text:p>
            <text:p>  {"host": "10.3.14.13", "probe": "find"},</text:p>
            <text:p>  </text:p>
            <text:p>  {"host": "56.3.1.42", "probe": "disk-free"},</text:p>
            <text:p>  {"host": "56.3.1.42", "probe": "find"},</text:p>
            <text:p>  </text:p>
            <text:p>  {"host": "10.3.14.15", "probe": "disk-free"},</text:p>
            <text:p>  {"host": "10.3.14.15", "probe": "find"},</text:p>
            <text:p>  </text:p>
            <text:p>  {"host": "10.3.14.16", "probe": "disk-free"},</text:p>
            <text:p>  {"host": "10.3.14.16", "probe": "find"},</text:p>
            <text:p>  </text:p>
            <text:p>  {"host": "10.3.14.17", "probe": "disk-free"},</text:p>
            <text:p>  {"host": "10.3.14.17", "probe": "find"}</text:p>
            <text:p>]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 style:data-style-name="N2" text:time-value="14:34:57.1578428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0:53:22.082048169</meta:creation-date>
    <dc:date>2026-06-22T14:35:06.924371654</dc:date>
    <meta:editing-duration>PT10H42M3S</meta:editing-duration>
    <meta:editing-cycles>41</meta:editing-cycles>
    <meta:generator>LibreOffice/24.2.7.2$Linux_X86_64 LibreOffice_project/420$Build-2</meta:generator>
    <meta:document-statistic meta:table-count="1" meta:cell-count="122" meta:object-count="0"/>
  </office:meta>
</office:document-meta>
</file>